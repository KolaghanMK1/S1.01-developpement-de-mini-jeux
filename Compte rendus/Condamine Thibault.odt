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style:font-name="Calibri" officeooo:rsid="0012fc27" officeooo:paragraph-rsid="0012fc27"/>
    </style:style>
    <style:style style:name="P2" style:family="paragraph" style:parent-style-name="Text_20_body" style:list-style-name="L1">
      <style:text-properties style:font-name="Calibri" officeooo:paragraph-rsid="0012fc27"/>
    </style:style>
    <style:style style:name="P3" style:family="paragraph" style:parent-style-name="Text_20_body" style:list-style-name="L1">
      <style:text-properties style:font-name="Calibri" officeooo:rsid="0012fc27" officeooo:paragraph-rsid="0012fc27"/>
    </style:style>
    <style:style style:name="P4" style:family="paragraph" style:parent-style-name="Text_20_body" style:list-style-name="L2">
      <style:text-properties style:font-name="Calibri" officeooo:rsid="0012fc27" officeooo:paragraph-rsid="0012fc27"/>
    </style:style>
    <style:style style:name="P5" style:family="paragraph" style:parent-style-name="Heading_20_2">
      <style:text-properties officeooo:rsid="0012fc27" officeooo:paragraph-rsid="0014ce07"/>
    </style:style>
    <style:style style:name="P6" style:family="paragraph" style:parent-style-name="Text_20_body" style:list-style-name="L3">
      <style:text-properties style:font-name="Calibri" officeooo:rsid="0012fc27" officeooo:paragraph-rsid="0012fc27"/>
    </style:style>
    <style:style style:name="P7" style:family="paragraph" style:parent-style-name="Text_20_body" style:list-style-name="L3">
      <style:text-properties style:font-name="Calibri" officeooo:rsid="0014ce07" officeooo:paragraph-rsid="0014ce07"/>
    </style:style>
    <style:style style:name="P8" style:family="paragraph" style:parent-style-name="Text_20_body" style:list-style-name="L4">
      <style:text-properties style:font-name="Calibri" officeooo:rsid="0014ce07" officeooo:paragraph-rsid="0014ce07"/>
    </style:style>
    <style:style style:name="P9" style:family="paragraph" style:parent-style-name="Text_20_body" style:list-style-name="L5">
      <style:text-properties style:font-name="Calibri" officeooo:rsid="00120125" officeooo:paragraph-rsid="0015d385"/>
    </style:style>
    <style:style style:name="P10" style:family="paragraph" style:parent-style-name="Text_20_body" style:list-style-name="L6">
      <style:text-properties style:font-name="Calibri" officeooo:rsid="00120125" officeooo:paragraph-rsid="0015d385"/>
    </style:style>
    <style:style style:name="P11" style:family="paragraph" style:parent-style-name="Text_20_body" style:list-style-name="L7">
      <style:text-properties style:font-name="Calibri" officeooo:rsid="00120125" officeooo:paragraph-rsid="0015d385"/>
    </style:style>
    <style:style style:name="P12" style:family="paragraph" style:parent-style-name="Text_20_body" style:list-style-name="L7">
      <style:text-properties style:font-name="Calibri" officeooo:rsid="0015d385" officeooo:paragraph-rsid="0015d385"/>
    </style:style>
    <style:style style:name="P13" style:family="paragraph" style:parent-style-name="Text_20_body" style:list-style-name="L8">
      <style:text-properties style:font-name="Calibri" officeooo:rsid="00120125" officeooo:paragraph-rsid="0016a72d"/>
    </style:style>
    <style:style style:name="P14" style:family="paragraph" style:parent-style-name="Text_20_body" style:list-style-name="L9">
      <style:text-properties style:font-name="Calibri" officeooo:rsid="00120125" officeooo:paragraph-rsid="0016a72d"/>
    </style:style>
    <style:style style:name="P15" style:family="paragraph" style:parent-style-name="Heading_20_2">
      <style:text-properties officeooo:paragraph-rsid="0014ce07"/>
    </style:style>
    <style:style style:name="P16" style:family="paragraph" style:parent-style-name="Text_20_body">
      <style:text-properties style:font-name="Calibri" officeooo:rsid="00120125" officeooo:paragraph-rsid="0016a72d"/>
    </style:style>
    <style:style style:name="P17" style:family="paragraph" style:parent-style-name="Text_20_body" style:list-style-name="L10">
      <style:text-properties style:font-name="Calibri" officeooo:rsid="00120125" officeooo:paragraph-rsid="0016a72d"/>
    </style:style>
    <style:style style:name="P18" style:family="paragraph" style:parent-style-name="Text_20_body">
      <style:text-properties style:font-name="Calibri" officeooo:rsid="0016a72d" officeooo:paragraph-rsid="0016a72d"/>
    </style:style>
    <style:style style:name="P19" style:family="paragraph" style:parent-style-name="Heading_20_3">
      <style:text-properties officeooo:rsid="00120125"/>
    </style:style>
    <style:style style:name="P20" style:family="paragraph" style:parent-style-name="Text_20_body">
      <style:text-properties style:font-name="Calibri" officeooo:rsid="00120125" officeooo:paragraph-rsid="001725eb"/>
    </style:style>
    <style:style style:name="P21" style:family="paragraph" style:parent-style-name="Text_20_body" style:list-style-name="List_20_1">
      <style:text-properties style:font-name="Calibri" officeooo:rsid="00120125" officeooo:paragraph-rsid="001725eb"/>
    </style:style>
    <style:style style:name="P22" style:family="paragraph" style:parent-style-name="Heading_20_3">
      <style:paragraph-properties fo:margin-top="0cm" fo:margin-bottom="0.247cm" style:contextual-spacing="false" fo:line-height="115%"/>
      <style:text-properties officeooo:rsid="00120125"/>
    </style:style>
    <style:style style:name="P23" style:family="paragraph" style:parent-style-name="Heading_20_2">
      <style:text-properties officeooo:rsid="00120125" officeooo:paragraph-rsid="0014ce07"/>
    </style:style>
    <style:style style:name="P24" style:family="paragraph" style:parent-style-name="Heading_20_2">
      <style:text-properties officeooo:rsid="00120125" officeooo:paragraph-rsid="00120125"/>
    </style:style>
    <style:style style:name="P25" style:family="paragraph" style:parent-style-name="Text_20_body">
      <style:text-properties style:font-name="Calibri" officeooo:rsid="001725eb" officeooo:paragraph-rsid="001725eb"/>
    </style:style>
    <style:style style:name="P26" style:family="paragraph" style:parent-style-name="Text_20_body">
      <style:text-properties style:font-name="Calibri" officeooo:rsid="0018bcea" officeooo:paragraph-rsid="0018bcea"/>
    </style:style>
    <style:style style:name="P27" style:family="paragraph" style:parent-style-name="Text_20_body" style:list-style-name="L11">
      <style:text-properties style:font-name="Calibri" officeooo:rsid="0018bcea" officeooo:paragraph-rsid="0018bcea"/>
    </style:style>
    <style:style style:name="P28" style:family="paragraph" style:parent-style-name="Text_20_body" style:list-style-name="List_20_1">
      <style:text-properties style:font-name="Calibri" officeooo:rsid="00120125" officeooo:paragraph-rsid="0018bcea"/>
    </style:style>
    <style:style style:name="P29" style:family="paragraph" style:parent-style-name="Text_20_body" style:list-style-name="List_20_1">
      <style:text-properties style:font-name="Calibri" officeooo:rsid="0018bcea" officeooo:paragraph-rsid="0018bcea"/>
    </style:style>
    <style:style style:name="P30" style:family="paragraph" style:parent-style-name="Text_20_body">
      <style:text-properties style:font-name="Calibri" officeooo:rsid="00120125" officeooo:paragraph-rsid="00120125"/>
    </style:style>
    <style:style style:name="P31" style:family="paragraph" style:parent-style-name="Heading_20_2">
      <style:paragraph-properties fo:margin-top="0cm" fo:margin-bottom="0.247cm" style:contextual-spacing="false" fo:line-height="115%"/>
      <style:text-properties officeooo:rsid="00120125" officeooo:paragraph-rsid="0014ce07"/>
    </style:style>
    <style:style style:name="P32" style:family="paragraph" style:parent-style-name="Heading_20_2">
      <style:paragraph-properties fo:margin-top="0cm" fo:margin-bottom="0.247cm" style:contextual-spacing="false" fo:line-height="115%"/>
      <style:text-properties officeooo:rsid="00120125" officeooo:paragraph-rsid="001a6c15"/>
    </style:style>
    <style:style style:name="P33" style:family="paragraph" style:parent-style-name="Text_20_body">
      <style:paragraph-properties fo:margin-top="0cm" fo:margin-bottom="0.247cm" style:contextual-spacing="false" fo:line-height="115%" fo:text-align="center" style:justify-single-word="false"/>
      <style:text-properties officeooo:paragraph-rsid="001a6c15"/>
    </style:style>
    <style:style style:name="P34" style:family="paragraph" style:parent-style-name="Text_20_body">
      <style:paragraph-properties fo:margin-top="0cm" fo:margin-bottom="0.247cm" style:contextual-spacing="false" fo:line-height="115%"/>
      <style:text-properties officeooo:paragraph-rsid="001a6c15"/>
    </style:style>
    <style:style style:name="T1" style:family="text">
      <style:text-properties style:font-name="Calibri"/>
    </style:style>
    <style:style style:name="T2" style:family="text">
      <style:text-properties officeooo:rsid="0012fc27"/>
    </style:style>
    <style:style style:name="T3" style:family="text">
      <style:text-properties officeooo:rsid="0015d385"/>
    </style:style>
    <style:style style:name="T4" style:family="text">
      <style:text-properties style:font-name="Calibri" officeooo:rsid="0015d385"/>
    </style:style>
    <style:style style:name="T5" style:family="text">
      <style:text-properties officeooo:rsid="0016a72d"/>
    </style:style>
    <style:style style:name="T6" style:family="text">
      <style:text-properties officeooo:rsid="00120125"/>
    </style:style>
    <style:style style:name="T7" style:family="text">
      <style:text-properties style:font-name="Calibri" officeooo:rsid="0016a72d"/>
    </style:style>
    <style:style style:name="T8" style:family="text">
      <style:text-properties officeooo:rsid="001725eb"/>
    </style:style>
    <style:style style:name="T9" style:family="text">
      <style:text-properties officeooo:rsid="0018bcea"/>
    </style:style>
    <style:style style:name="T10" style:family="text">
      <style:text-properties style:font-name="Calibri" officeooo:rsid="0018bcea"/>
    </style:style>
    <style:style style:name="T11" style:family="text">
      <style:text-properties officeooo:rsid="001a6c15"/>
    </style:style>
    <style:style style:name="T12" style:family="text">
      <style:text-properties style:font-name="Calibri" officeooo:rsid="001a6c15"/>
    </style:style>
    <style:style style:name="T13" style:family="text">
      <style:text-properties style:font-name="Calibri" style:text-underline-style="solid" style:text-underline-width="auto" style:text-underline-color="font-color" officeooo:rsid="001a6c15"/>
    </style:style>
    <style:style style:name="T14" style:family="text">
      <style:text-properties style:font-name="Calibri" style:text-underline-style="none" fo:font-weight="normal" officeooo:rsid="001a6c15" style:font-weight-asian="normal" style:font-weight-complex="normal"/>
    </style:style>
    <style:style style:name="T15" style:family="text">
      <style:text-properties style:font-name="Calibri" fo:font-weight="normal" officeooo:rsid="001a6c15"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1">RAPPORT DE PROJET — Jeu du Pendu en C++</text:span></text:span></text:h>
      <text:h text:style-name="Heading_20_2" text:outline-level="2"><text:span text:style-name="Strong_20_Emphasis"><text:span text:style-name="T1">1. Introduction</text:span></text:span></text:h>
      <text:p text:style-name="P1">Durant ce projet, j’ai réalisé la programmation du jeu du Pendu. Ce dernier repose sur 2 principes simples :</text:p>
      <text:list text:style-name="L1">
        <text:list-item>
          <text:p text:style-name="P2"><text:span text:style-name="T2">Le joueur 1 entre un mot ou phrase à faire deviner ;</text:span></text:p>
        </text:list-item>
        <text:list-item>
          <text:p text:style-name="P3">Le joueur 2 tente ensuite de découvrir ce mot en entrant des lettres ou des réponses complètes.</text:p>
        </text:list-item>
      </text:list>
      <text:p text:style-name="P1">La programmation du jeu du Pendu inclus l’intégration d’un système de menu et d’un moteur d’affichage textuel réalisé par mon camarade Théo BARDOUX, permettant notamment l’affichage du tableau du pendu, l’affichage de designs ASCII avec les couleurs ANSI ou encore l’effacement de la console.</text:p>
      <text:p text:style-name="P1">Pour ma part, mon code se base sur des principes clés :</text:p>
      <text:list text:style-name="L2">
        <text:list-item>
          <text:p text:style-name="P4">la sécurité de la saisie, sur laquelle je mets un point d’honneur ;</text:p>
        </text:list-item>
        <text:list-item>
          <text:p text:style-name="P4">le respect des contraintes ASCII ;</text:p>
        </text:list-item>
        <text:list-item>
          <text:p text:style-name="P4">une logique de jeu entièrement contrôlée ;</text:p>
        </text:list-item>
        <text:list-item>
          <text:p text:style-name="P4">un affichage clair et progressif de l’état de la partie.</text:p>
        </text:list-item>
      </text:list>
      <text:h text:style-name="P5" text:outline-level="2"><text:span text:style-name="Strong_20_Emphasis"><text:span text:style-name="T1">_____________________________________________________</text:span></text:span></text:h>
      <text:h text:style-name="Heading_20_2" text:outline-level="2"><text:span text:style-name="Strong_20_Emphasis"><text:span text:style-name="T1">2. Objectifs du projet</text:span></text:span></text:h>
      <text:h text:style-name="Heading_20_3" text:outline-level="3"><text:span text:style-name="Strong_20_Emphasis"><text:span text:style-name="T1">2.1. Fonctionnels</text:span></text:span></text:h>
      <text:list text:style-name="L3">
        <text:list-item>
          <text:p text:style-name="P6">Permettre une partie de Pendu entièrement jouable dans un terminal.</text:p>
        </text:list-item>
        <text:list-item>
          <text:p text:style-name="P7">Éviter, en encadrant, TOUT comportement qui pourrait potentiellement casser le programme en limitant les saisies aux caractères ASCII.</text:p>
        </text:list-item>
        <text:list-item>
          <text:p text:style-name="P7">Gérer les entrées incorrectes, les répétitions et les erreurs utilisateurs.</text:p>
        </text:list-item>
        <text:list-item>
          <text:p text:style-name="P7">Présenter visuellement :</text:p>
          <text:list>
            <text:list-item>
              <text:p text:style-name="P7">Le logo du jeu ;</text:p>
            </text:list-item>
            <text:list-item>
              <text:p text:style-name="P7">Les règles du jeu ;</text:p>
            </text:list-item>
            <text:list-item>
              <text:p text:style-name="P7">La barre de vie (10 cœurs) ;</text:p>
            </text:list-item>
            <text:list-item>
              <text:p text:style-name="P7">Le tableau évolutif du pendu ;</text:p>
            </text:list-item>
            <text:list-item>
              <text:p text:style-name="P7"><text:soft-page-break/>Les lettres trouvées ;</text:p>
            </text:list-item>
            <text:list-item>
              <text:p text:style-name="P7">Les lettres restantes à deviner.</text:p>
            </text:list-item>
          </text:list>
        </text:list-item>
      </text:list>
      <text:h text:style-name="Heading_20_3" text:outline-level="3"><text:span text:style-name="Strong_20_Emphasis"><text:span text:style-name="T1">2.2. Techniques</text:span></text:span></text:h>
      <text:list text:style-name="L4">
        <text:list-item>
          <text:p text:style-name="P8">Contrôle toutes les saisies via « getline » ;</text:p>
        </text:list-item>
        <text:list-item>
          <text:p text:style-name="P8">Établir un format stable et universel en MAJUSCULES via « formatMAJ » ;</text:p>
        </text:list-item>
        <text:list-item>
          <text:p text:style-name="P8">Bloquer les saisies incorrectes, notamment les caractères non-ASCII, grâce à l’utilisation d’une copie de caractère en unsigned via « static_cast&lt;unsigned char&gt; » ;</text:p>
        </text:list-item>
        <text:list-item>
          <text:p text:style-name="P8">Avoir une architecture organisée et claire :</text:p>
          <text:list>
            <text:list-item>
              <text:p text:style-name="P8">vérification du format ;</text:p>
            </text:list-item>
            <text:list-item>
              <text:p text:style-name="P8">analyse de la réponse ;</text:p>
            </text:list-item>
            <text:list-item>
              <text:p text:style-name="P8">affichage des messages ;</text:p>
            </text:list-item>
            <text:list-item>
              <text:p text:style-name="P8">gestion de la fin de partie.</text:p>
            </text:list-item>
          </text:list>
        </text:list-item>
      </text:list>
      <text:h text:style-name="Heading_20_2" text:outline-level="2"><text:span text:style-name="Strong_20_Emphasis"><text:span text:style-name="T1">_____________________________________________________</text:span></text:span></text:h>
      <text:h text:style-name="Heading_20_2" text:outline-level="2"><text:span text:style-name="Strong_20_Emphasis"><text:span text:style-name="T1">3. Architecture générale du programme</text:span></text:span></text:h>
      <text:h text:style-name="Heading_20_3" text:outline-level="3"><text:span text:style-name="Strong_20_Emphasis"><text:span text:style-name="T1">3.1. Fonctions de validation</text:span></text:span></text:h>
      <text:list text:style-name="L5">
        <text:list-item>
          <text:p text:style-name="P9">hasUnsupportedChar : détecte les caractères ASCII non visibles ou non pris en charge ;</text:p>
        </text:list-item>
        <text:list-item>
          <text:p text:style-name="P9">verifFormat : renvoie un code décrivant l’état du format du mot (0, 1, 2 ou 3) ;</text:p>
        </text:list-item>
        <text:list-item>
          <text:p text:style-name="P9">displayVerifFomat : informe l’utilisateur selon le code reçu.</text:p>
        </text:list-item>
      </text:list>
      <text:h text:style-name="Heading_20_3" text:outline-level="3"><text:span text:style-name="Strong_20_Emphasis"><text:span text:style-name="T1">3.2. Fonctions liées au jeu</text:span></text:span></text:h>
      <text:list text:style-name="L6">
        <text:list-item>
          <text:p text:style-name="P10">displayNonLetters : rend les espaces et ponctuations <text:span text:style-name="T3">visibles pour le joueur 2 dès le début de la partie ;</text:span></text:p>
        </text:list-item>
        <text:list-item>
          <text:p text:style-name="P10">formatMAJ : c<text:span text:style-name="T3">onverti une chaine de caractère de format conforme en MAJUSCULES ;</text:span></text:p>
        </text:list-item>
        <text:list-item>
          <text:p text:style-name="P10">verifPendu : <text:span text:style-name="T3">processus principal</text:span> du jeu : <text:span text:style-name="T3">gère les </text:span>lettres correctes, erreurs <text:span text:style-name="T3">et</text:span> répétitions ;</text:p>
        </text:list-item>
        <text:list-item>
          <text:p text:style-name="P10">displayVerifPendu : a<text:span text:style-name="T3">ffiche </text:span>messages associés au résultat de la vérification ;</text:p>
        </text:list-item>
        <text:list-item>
          <text:p text:style-name="P10">endGame : détecte <text:span text:style-name="T3">la</text:span> victoire ou <text:span text:style-name="T3">la </text:span>défaite et termine la partie.</text:p>
        </text:list-item>
      </text:list>
      <text:h text:style-name="Heading_20_3" text:outline-level="3"><text:span text:style-name="Strong_20_Emphasis"><text:span text:style-name="T1">3.3. Fonctions d’afficha</text:span></text:span><text:span text:style-name="Strong_20_Emphasis"><text:span text:style-name="T4">g</text:span></text:span><text:span text:style-name="Strong_20_Emphasis"><text:span text:style-name="T1">e</text:span></text:span></text:h>
      <text:list text:style-name="L7">
        <text:list-item>
          <text:p text:style-name="P11">displayVector : <text:span text:style-name="T3">fonction d’affichage des vecteurs dont les paramètres associés sont :</text:span></text:p>
          <text:list>
            <text:list-item>
              <text:p text:style-name="P12">le vecteur à afficher ;</text:p>
            </text:list-item>
            <text:list-item>
              <text:p text:style-name="P12"><text:soft-page-break/>la chaîne de caractères qui s’affiche à GAUCHE de chaque élément du vecteur ;</text:p>
            </text:list-item>
            <text:list-item>
              <text:p text:style-name="P12">la chaîne de caractères qui s’affiche à DROITE de chaque élément du vecteur ;</text:p>
            </text:list-item>
            <text:list-item>
              <text:p text:style-name="P12">la chaîne de caractères qui vient séparer chaque élément du vecteur.</text:p>
            </text:list-item>
          </text:list>
        </text:list-item>
        <text:list-item>
          <text:p text:style-name="P11">DisplayRulesAndSupport : affiche les règles officielles du jeu et les restrictions ASCII.</text:p>
        </text:list-item>
        <text:list-item>
          <text:p text:style-name="P11">Affichages divers via TUI_Core::render.display.</text:p>
        </text:list-item>
      </text:list>
      <text:h text:style-name="Heading_20_3" text:outline-level="3"><text:span text:style-name="Strong_20_Emphasis"><text:span text:style-name="T1">3.4. Organisation des tours</text:span></text:span></text:h>
      <text:list text:style-name="L8">
        <text:list-item>
          <text:p text:style-name="P13">Player1Turn : <text:span text:style-name="T5">processus gérant le tour du joueur 1 : </text:span>saisie et validation du mot secret<text:span text:style-name="T5"> ;</text:span></text:p>
        </text:list-item>
        <text:list-item>
          <text:p text:style-name="P13">Player2Turn : <text:span text:style-name="T5">processus gérant le tour du joueur 2 : </text:span>boucle de jeu principale<text:span text:style-name="T5">.</text:span></text:p>
        </text:list-item>
      </text:list>
      <text:h text:style-name="Heading_20_3" text:outline-level="3"><text:span text:style-name="Strong_20_Emphasis"><text:span text:style-name="T1">3.5. Menu</text:span></text:span></text:h>
      <text:list text:style-name="L9">
        <text:list-item>
          <text:p text:style-name="P14">PlayPendu : <text:span text:style-name="T5">fonction d’exécution du jeu ;</text:span></text:p>
        </text:list-item>
        <text:list-item>
          <text:p text:style-name="P14">SettingsPendu : <text:span text:style-name="T5">menu gérant les paramètres du jeu (aucun paramètre pour le moment) ;</text:span></text:p>
        </text:list-item>
        <text:list-item>
          <text:p text:style-name="P14">PenduMenu : c<text:span text:style-name="T5">omprend un menu complet avec les différents sous-menus suivants : </text:span></text:p>
          <text:list>
            <text:list-item>
              <text:p text:style-name="P14">Play</text:p>
            </text:list-item>
            <text:list-item>
              <text:p text:style-name="P14">Settings</text:p>
            </text:list-item>
            <text:list-item>
              <text:p text:style-name="P14">Credits</text:p>
            </text:list-item>
            <text:list-item>
              <text:p text:style-name="P14">Exit</text:p>
            </text:list-item>
          </text:list>
        </text:list-item>
      </text:list>
      <text:h text:style-name="P15" text:outline-level="2"><text:span text:style-name="Strong_20_Emphasis"><text:span text:style-name="T1">_____________________________________________________</text:span></text:span></text:h>
      <text:h text:style-name="Heading_20_2" text:outline-level="2"><text:span text:style-name="Strong_20_Emphasis"><text:span text:style-name="T1">4. Principes de conception adoptés</text:span></text:span></text:h>
      <text:h text:style-name="Heading_20_3" text:outline-level="3"><text:span text:style-name="Strong_20_Emphasis"><text:span text:style-name="T1">4.1. Sécurisation complète de la saisie</text:span></text:span></text:h>
      <text:p text:style-name="P16">Les saisies utilisateur constituent l’un des aspects <text:span text:style-name="T5">importants</text:span> du jeu. <text:span text:style-name="T5">Un problème engendré par un caractère non-supporté est vite arrivé si le code n’est pas solide.</text:span><text:line-break/>Le programme utilise :</text:p>
      <text:list text:style-name="L10">
        <text:list-item>
          <text:p text:style-name="P17">getline(cin &gt;&gt; ws, ...) pour <text:span text:style-name="T5">vider le buffer et effacer les espaces inutiles au début des strings ;</text:span></text:p>
        </text:list-item>
        <text:list-item>
          <text:p text:style-name="P17">un filtrage strict ASCII ;</text:p>
        </text:list-item>
        <text:list-item>
          <text:p text:style-name="P17">un test sur chaque caractère via unsigned char.</text:p>
        </text:list-item>
      </text:list>
      <text:p text:style-name="P18">Cela permet d’<text:span text:style-name="T6">élimine</text:span>r<text:span text:style-name="T6"> les comportements indéfinis des char signés (-128 à 127) </text:span>en rendant leur valeur strictement positive (0 à 255)<text:span text:style-name="T6">, </text:span>couvrant la plage ASCII étendue et garantissant<text:span text:style-name="T6"> </text:span>la validité de<text:span text:style-name="T6"> </text:span>la condition if<text:span text:style-name="T6"> </text:span>(<text:span text:style-name="T6">c &lt; 32 || c &gt; 126</text:span>).</text:p>
      <text:h text:style-name="P19" text:outline-level="3"><text:soft-page-break/><text:span text:style-name="Strong_20_Emphasis"><text:span text:style-name="T1">4.2. Gestion d’erreurs </text:span></text:span><text:span text:style-name="Strong_20_Emphasis"><text:span text:style-name="T7">complète</text:span></text:span></text:h>
      <text:p text:style-name="P20">Chaque situation potentielle est traitée <text:span text:style-name="T8">et est associée à un message dédié</text:span> :</text:p>
      <text:list text:style-name="List_20_1">
        <text:list-item>
          <text:p text:style-name="P21">réponses trop longues ;</text:p>
        </text:list-item>
        <text:list-item>
          <text:p text:style-name="P21">mauvaises réponses ;</text:p>
        </text:list-item>
        <text:list-item>
          <text:p text:style-name="P21">mauvaises lettres ;</text:p>
        </text:list-item>
        <text:list-item>
          <text:p text:style-name="P21">réponses déjà tentées </text:p>
        </text:list-item>
        <text:list-item>
          <text:p text:style-name="P21">répétitions non pénalisées ;</text:p>
        </text:list-item>
        <text:list-item>
          <text:p text:style-name="P21">format incorrect ;</text:p>
        </text:list-item>
        <text:list-item>
          <text:p text:style-name="P21">absence de lettres dans le mot saisi ;</text:p>
        </text:list-item>
        <text:list-item>
          <text:p text:style-name="P21">caractères non conformes.</text:p>
        </text:list-item>
      </text:list>
      <text:h text:style-name="P22" text:outline-level="3"><text:span text:style-name="Strong_20_Emphasis"><text:span text:style-name="T1">4.3. Respect strict du standard ASCII</text:span></text:span></text:h>
      <text:p text:style-name="P20">Le <text:span text:style-name="T8">code</text:span> interdit :</text:p>
      <text:list text:continue-numbering="true" text:style-name="List_20_1">
        <text:list-item>
          <text:p text:style-name="P21">les lettres accentuées ;</text:p>
        </text:list-item>
        <text:list-item>
          <text:p text:style-name="P21">les touches directionnelles ;</text:p>
        </text:list-item>
        <text:list-item>
          <text:p text:style-name="P21">les caractères invisibles ;</text:p>
        </text:list-item>
        <text:list-item>
          <text:p text:style-name="P21">tout non-ASCII (Unicode, Alt+codes, etc.).</text:p>
        </text:list-item>
      </text:list>
      <text:p text:style-name="P20">Cette contrainte élimine <text:span text:style-name="T8">les erreurs qui pourraient nuire au bon fonctionnement du jeu</text:span>. <text:span text:style-name="T8">Néanmoins, un simple avertissement textuel sert à prévenir d’utiliser les touches directionnelles.</text:span></text:p>
      <text:h text:style-name="P22" text:outline-level="3"><text:span text:style-name="Strong_20_Emphasis"><text:span text:style-name="T1">4.4. Mise en forme visuelle</text:span></text:span></text:h>
      <text:p text:style-name="P20">L’état du jeu est affiché :</text:p>
      <text:list xml:id="list231419368349094" text:continue-numbering="true" text:style-name="List_20_1">
        <text:list-item>
          <text:p text:style-name="P21">barre de vie (10 cœurs) ;</text:p>
        </text:list-item>
        <text:list-item>
          <text:p text:style-name="P21">affichage du pendu via ASCII art ;</text:p>
        </text:list-item>
        <text:list-item>
          <text:p text:style-name="P21">progression (lettres trouvées) ;</text:p>
        </text:list-item>
        <text:list-item>
          <text:p text:style-name="P21">caractères restants (^);</text:p>
        </text:list-item>
        <text:list-item>
          <text:p text:style-name="P21">mauvaises lettres et mots.</text:p>
        </text:list-item>
      </text:list>
      <text:h text:style-name="P23" text:outline-level="2"><text:soft-page-break/><text:span text:style-name="Strong_20_Emphasis"><text:span text:style-name="T1">_____________________________________________________</text:span></text:span></text:h>
      <text:h text:style-name="P24" text:outline-level="2"><text:span text:style-name="Strong_20_Emphasis"><text:span text:style-name="T1">5. Déroulement d’une partie</text:span></text:span></text:h>
      <text:h text:style-name="P22" text:outline-level="3"><text:span text:style-name="Strong_20_Emphasis"><text:span text:style-name="T1">5.1. Saisie du Joueur 1</text:span></text:span></text:h>
      <text:p text:style-name="P25">Le joueur 1 saisit un mot ou une phrase. Le programme vérifie ensuite si l’entrée est conforme (pas de caractère ASCII + au moins une lettre). Si c’est le cas, la string est passé en MAJUSCULES pour un format uniforme et la progression est créée de longueur égale à celle de la string saisie précédemment.</text:p>
      <text:h text:style-name="P22" text:outline-level="3"><text:span text:style-name="Strong_20_Emphasis"><text:span text:style-name="T1">5.2. Déroulement du tour du Joueur 2</text:span></text:span></text:h>
      <text:p text:style-name="P26">A chaque tour, le joueur saisit une lettre ou une réponse complète.</text:p>
      <text:p text:style-name="P26">La string saisie est ensuite vérifiée parmi les cas suivants :</text:p>
      <text:list text:style-name="L11">
        <text:list-item>
          <text:p text:style-name="P27">lettre correcte ;</text:p>
        </text:list-item>
        <text:list-item>
          <text:p text:style-name="P27">lettre déjà tentée ;</text:p>
        </text:list-item>
        <text:list-item>
          <text:p text:style-name="P27">lettre incorrecte ;</text:p>
        </text:list-item>
        <text:list-item>
          <text:p text:style-name="P27">réponse correcte ;</text:p>
        </text:list-item>
        <text:list-item>
          <text:p text:style-name="P27">réponse incorrecte ;</text:p>
        </text:list-item>
        <text:list-item>
          <text:p text:style-name="P27">réponse trop longue.</text:p>
        </text:list-item>
      </text:list>
      <text:p text:style-name="P26">La progression, les vies, le pendu et les vecteurs associés aux tentatives précédentes sont mis à jour.</text:p>
      <text:p text:style-name="P26">Si toutes les lettres ont été révélées, le joueur 2 a gagné. S’il a réalisé 10 erreurs, il a perdu.</text:p>
      <text:h text:style-name="P23" text:outline-level="2"><text:span text:style-name="Strong_20_Emphasis"><text:span text:style-name="T1">_____________________________________________________</text:span></text:span></text:h>
      <text:h text:style-name="P24" text:outline-level="2"><text:span text:style-name="Strong_20_Emphasis"><text:span text:style-name="T1">6. Analyse du code et qualités techniques</text:span></text:span></text:h>
      <text:h text:style-name="P22" text:outline-level="3"><text:span text:style-name="Strong_20_Emphasis"><text:span text:style-name="T1">6.1. Points forts</text:span></text:span></text:h>
      <text:list text:continue-list="list231419368349094" text:style-name="List_20_1">
        <text:list-item>
          <text:p text:style-name="P28">Architecture claire <text:span text:style-name="T9">et</text:span> bien segmentée ;</text:p>
        </text:list-item>
        <text:list-item>
          <text:p text:style-name="P28"><text:span text:style-name="T9">Entrées utilisateur strictement encadrées</text:span> ;</text:p>
        </text:list-item>
        <text:list-item>
          <text:p text:style-name="P28"><text:span text:style-name="T9">Protocole ASCII sécurisé</text:span> ;</text:p>
        </text:list-item>
        <text:list-item>
          <text:p text:style-name="P28">Utilisation <text:span text:style-name="T9">d’unsigned char pour une meilleur gestion des saisies</text:span> ;</text:p>
        </text:list-item>
        <text:list-item>
          <text:p text:style-name="P28">Messages d'erreur précis et contextualisés ;</text:p>
        </text:list-item>
        <text:list-item>
          <text:p text:style-name="P28">Bonne séparation entre logique et affichage.</text:p>
        </text:list-item>
      </text:list>
      <text:h text:style-name="P22" text:outline-level="3"><text:soft-page-break/><text:span text:style-name="Strong_20_Emphasis"><text:span text:style-name="T1">6.2. Éléments améliorables</text:span></text:span></text:h>
      <text:list text:continue-numbering="true" text:style-name="List_20_1">
        <text:list-item>
          <text:p text:style-name="P28">Certaines conditions pourraient être simplifiées ;</text:p>
        </text:list-item>
        <text:list-item>
          <text:p text:style-name="P29">Certains éléments nouveaux comme unsigned char mériteraient plus d’explications ;</text:p>
        </text:list-item>
        <text:list-item>
          <text:p text:style-name="P29">Utilisation possiblement abusive des const et des &amp; (références).</text:p>
        </text:list-item>
      </text:list>
      <text:h text:style-name="P23" text:outline-level="2"><text:span text:style-name="Strong_20_Emphasis"><text:span text:style-name="T1">_____________________________________________________</text:span></text:span></text:h>
      <text:h text:style-name="P24" text:outline-level="2"><text:span text:style-name="Strong_20_Emphasis"><text:span text:style-name="T10">7</text:span></text:span><text:span text:style-name="Strong_20_Emphasis"><text:span text:style-name="T1">. Conclusion</text:span></text:span></text:h>
      <text:p text:style-name="P30">Ce projet propose une implémentation complète, robuste et soignée du jeu du Pendu en C++.<text:line-break/><text:span text:style-name="T11">J’ai souhaité mettre l</text:span>’accent sur la sécurité de saisie, <text:span text:style-name="T11">la compatibilité ASCII et la lisibilité, rendant le code en apparence assez propre et simple mais en même temps montrant que des améliorations sont toujours possibles.</text:span></text:p>
      <text:h text:style-name="P31" text:outline-level="2"><text:span text:style-name="Strong_20_Emphasis"><text:span text:style-name="T1">_____________________________________________________</text:span></text:span></text:h>
      <text:h text:style-name="P32" text:outline-level="2"><text:span text:style-name="Strong_20_Emphasis"><text:span text:style-name="T10">8</text:span></text:span><text:span text:style-name="Strong_20_Emphasis"><text:span text:style-name="T1">. Annexes : </text:span></text:span><text:span text:style-name="Strong_20_Emphasis"><text:span text:style-name="T12">Résumé des fonctions principales</text:span></text:span></text:h>
      <table:table table:name="Tableau1" table:style-name="Tableau1">
        <table:table-column table:style-name="Tableau1.A" table:number-columns-repeated="2"/>
        <table:table-row>
          <table:table-cell table:style-name="Tableau1.A1" office:value-type="string">
            <text:p text:style-name="P33"><text:span text:style-name="Strong_20_Emphasis"><text:span text:style-name="T13">Fonction</text:span></text:span></text:p>
          </table:table-cell>
          <table:table-cell table:style-name="Tableau1.B1" office:value-type="string">
            <text:p text:style-name="P33"><text:span text:style-name="Strong_20_Emphasis"><text:span text:style-name="T13">Rôle</text:span></text:span></text:p>
          </table:table-cell>
        </table:table-row>
        <table:table-row>
          <table:table-cell table:style-name="Tableau1.A2" office:value-type="string">
            <text:p text:style-name="P34"><text:span text:style-name="Strong_20_Emphasis"><text:span text:style-name="T14">verifFormat</text:span></text:span></text:p>
          </table:table-cell>
          <table:table-cell table:style-name="Tableau1.B2" office:value-type="string">
            <text:p text:style-name="P34"><text:span text:style-name="Strong_20_Emphasis"><text:span text:style-name="T15">Analyse la conformité de la saisie</text:span></text:span></text:p>
          </table:table-cell>
        </table:table-row>
        <table:table-row>
          <table:table-cell table:style-name="Tableau1.A2" office:value-type="string">
            <text:p text:style-name="P34"><text:span text:style-name="Strong_20_Emphasis"><text:span text:style-name="T14">hasUnsupportedChar</text:span></text:span></text:p>
          </table:table-cell>
          <table:table-cell table:style-name="Tableau1.B2" office:value-type="string">
            <text:p text:style-name="P34"><text:span text:style-name="Strong_20_Emphasis"><text:span text:style-name="T15">Détecte les caractères non supportés</text:span></text:span></text:p>
          </table:table-cell>
        </table:table-row>
        <table:table-row>
          <table:table-cell table:style-name="Tableau1.A2" office:value-type="string">
            <text:p text:style-name="P34"><text:span text:style-name="Strong_20_Emphasis"><text:span text:style-name="T14">displayNonLetters</text:span></text:span></text:p>
          </table:table-cell>
          <table:table-cell table:style-name="Tableau1.B2" office:value-type="string">
            <text:p text:style-name="P34"><text:span text:style-name="Strong_20_Emphasis"><text:span text:style-name="T15">Place les espaces/ponctuations dans la progression</text:span></text:span></text:p>
          </table:table-cell>
        </table:table-row>
        <table:table-row>
          <table:table-cell table:style-name="Tableau1.A2" office:value-type="string">
            <text:p text:style-name="P34"><text:span text:style-name="Strong_20_Emphasis"><text:span text:style-name="T14">countOccurencesChar</text:span></text:span></text:p>
          </table:table-cell>
          <table:table-cell table:style-name="Tableau1.B2" office:value-type="string">
            <text:p text:style-name="P34"><text:span text:style-name="Strong_20_Emphasis"><text:span text:style-name="T15">Nombre d’occurrences d’une lettre</text:span></text:span></text:p>
          </table:table-cell>
        </table:table-row>
        <table:table-row>
          <table:table-cell table:style-name="Tableau1.A2" office:value-type="string">
            <text:p text:style-name="P34"><text:span text:style-name="Strong_20_Emphasis"><text:span text:style-name="T14">verifPendu</text:span></text:span></text:p>
          </table:table-cell>
          <table:table-cell table:style-name="Tableau1.B2" office:value-type="string">
            <text:p text:style-name="P34"><text:span text:style-name="Strong_20_Emphasis"><text:span text:style-name="T15">Analyse la réponse du joueur</text:span></text:span></text:p>
          </table:table-cell>
        </table:table-row>
        <table:table-row>
          <table:table-cell table:style-name="Tableau1.A2" office:value-type="string">
            <text:p text:style-name="P34"><text:span text:style-name="Strong_20_Emphasis"><text:span text:style-name="T14">displayVector</text:span></text:span></text:p>
          </table:table-cell>
          <table:table-cell table:style-name="Tableau1.B2" office:value-type="string">
            <text:p text:style-name="P34"><text:span text:style-name="Strong_20_Emphasis"><text:span text:style-name="T15">Affiche proprement un vecteur de chaînes</text:span></text:span></text:p>
          </table:table-cell>
        </table:table-row>
        <table:table-row>
          <table:table-cell table:style-name="Tableau1.A2" office:value-type="string">
            <text:p text:style-name="P34"><text:span text:style-name="Strong_20_Emphasis"><text:span text:style-name="T14">endGame</text:span></text:span></text:p>
          </table:table-cell>
          <table:table-cell table:style-name="Tableau1.B2" office:value-type="string">
            <text:p text:style-name="P34"><text:span text:style-name="Strong_20_Emphasis"><text:span text:style-name="T15">Affichage de victoire/défaite</text:span></text:span></text:p>
          </table:table-cell>
        </table:table-row>
        <table:table-row>
          <table:table-cell table:style-name="Tableau1.A2" office:value-type="string">
            <text:p text:style-name="P34"><text:span text:style-name="Strong_20_Emphasis"><text:span text:style-name="T14">Player1Turn</text:span></text:span></text:p>
          </table:table-cell>
          <table:table-cell table:style-name="Tableau1.B2" office:value-type="string">
            <text:p text:style-name="P34"><text:span text:style-name="Strong_20_Emphasis"><text:span text:style-name="T15">Gestion du tour du Joueur 1</text:span></text:span></text:p>
          </table:table-cell>
        </table:table-row>
        <table:table-row>
          <table:table-cell table:style-name="Tableau1.A2" office:value-type="string">
            <text:p text:style-name="P34"><text:span text:style-name="Strong_20_Emphasis"><text:span text:style-name="T14">Player2Turn</text:span></text:span></text:p>
          </table:table-cell>
          <table:table-cell table:style-name="Tableau1.B2" office:value-type="string">
            <text:p text:style-name="P34"><text:span text:style-name="Strong_20_Emphasis"><text:span text:style-name="T15">Boucle principale du jeu</text:span></text:span></text:p>
          </table:table-cell>
        </table:table-row>
        <table:table-row>
          <table:table-cell table:style-name="Tableau1.A2" office:value-type="string">
            <text:p text:style-name="P34"><text:span text:style-name="Strong_20_Emphasis"><text:span text:style-name="T14">PenduMenu</text:span></text:span></text:p>
          </table:table-cell>
          <table:table-cell table:style-name="Tableau1.B2" office:value-type="string">
            <text:p text:style-name="P34"><text:span text:style-name="Strong_20_Emphasis"><text:span text:style-name="T15">Menu principal</text:span></text:span></text:p>
          </table:table-cell>
        </table:table-row>
      </table:table>
      <text:p text:style-name="P34"><text:span text:style-name="Strong_20_Emphasis"><text:span text:style-name="T1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libri" officeooo:rsid="001a6c15" officeooo:paragraph-rsid="001a6c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DAMINE Thibault L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18:26:40.026487200</meta:creation-date>
    <dc:date>2025-11-18T23:14:18.881780300</dc:date>
    <meta:editing-duration>PT23M57S</meta:editing-duration>
    <meta:editing-cycles>3</meta:editing-cycles>
    <meta:generator>LibreOffice/25.8.2.2$Windows_X86_64 LibreOffice_project/d401f2107ccab8f924a8e2df40f573aab7605b6f</meta:generator>
    <meta:document-statistic meta:table-count="1" meta:image-count="0" meta:object-count="0" meta:page-count="6" meta:paragraph-count="152" meta:word-count="1258" meta:character-count="7649" meta:non-whitespace-character-count="6623"/>
  </office:meta>
</office:document-meta>
</file>